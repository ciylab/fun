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67cm" fo:min-width="5.42cm" fo:padding-top="0.165cm" fo:padding-bottom="0.165cm" fo:padding-left="0.29cm" fo:padding-right="0.29cm" draw:shadow="visible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18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685cm" loext:decorative="false"/>
      <style:paragraph-properties style:writing-mode="lr-tb"/>
    </style:style>
    <style:style style:name="P1" style:family="paragraph">
      <style:paragraph-properties fo:text-align="start"/>
      <style:text-properties style:font-name="LM Mono 10"/>
    </style:style>
    <style:style style:name="P2" style:family="paragraph">
      <loext:graphic-properties draw:fill-color="#ffffff"/>
      <style:paragraph-properties fo:text-align="start" style:writing-mode="lr-tb"/>
      <style:text-properties style:font-name="LM Mono 10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font-name="LM Mono 1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color="#000000" loext:opacity="100%" style:font-name="LM Mono 10" fo:font-weight="bold" fo:background-color="#ffffff" style:font-weight-asian="bold" style:font-weight-complex="bold"/>
    </style:style>
    <style:style style:name="T1" style:family="text">
      <style:text-properties style:font-name="LM Mono 10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loext:opacity="100%" style:font-name="LM Mono 10"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4cm" svg:x="11.1cm" svg:y="6.2cm">
          <text:p text:style-name="P1"><text:span text:style-name="T1">&gt;ALGO <text:s text:c="3"/>FDBCK</text:span></text:p>
          <text:p text:style-name="P1"><text:span text:style-name="T1"><text:s/></text:span><text:span text:style-name="T1">ADSR <text:s text:c="3"/>MINLVL</text:span></text:p>
          <text:p text:style-name="P1"><text:span text:style-name="T1"><text:s/></text:span><text:span text:style-name="T1">OUT <text:s text:c="4"/>LFO</text:span></text:p>
          <text:p text:style-name="P1"><text:span text:style-name="T1"><text:s/></text:span><text:span text:style-name="T1">PITCH <text:s text:c="2"/>SCAL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4cm" svg:x="20.05cm" svg:y="1.9cm">
          <text:p text:style-name="P1"><text:span text:style-name="T1">&gt;ML1</text:span></text:p>
          <text:p text:style-name="P1"><text:span text:style-name="T2"><text:s/></text:span><text:span text:style-name="T2">ML2</text:span></text:p>
          <text:p text:style-name="P3"><text:span text:style-name="T2"><text:s/></text:span><text:span text:style-name="T2">ML3</text:span></text:p>
          <text:p text:style-name="P3"><text:span text:style-name="T2"><text:s/></text:span><text:span text:style-name="T2">ML4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7.761cm" svg:y1="7.846cm" svg:x2="20.05cm" svg:y2="3.9cm" draw:end-shape="id1" svg:d="M17761 7846h874v-3946h1415" svg:viewBox="0 0 2290 3947">
          <text:p/>
        </draw:connector>
        <draw:frame draw:style-name="gr3" draw:text-style-name="P5" draw:layer="layout" svg:width="7.618cm" svg:height="1.195cm" svg:x="10.382cm" svg:y="1.5cm">
          <draw:text-box>
            <text:p><text:span text:style-name="T3">VOLCA FM 4-OP</text:span></text:p>
          </draw:text-box>
        </draw:frame>
        <draw:frame draw:style-name="gr4" draw:text-style-name="P7" draw:layer="layout" svg:width="7cm" svg:height="1.935cm" svg:x="2.25cm" svg:y="1.25cm">
          <draw:text-box>
            <text:p><text:span text:style-name="T4">Canal MIDI IN <text:s/>= 1</text:span></text:p>
            <text:p text:style-name="P6"><text:span text:style-name="T4">Canal MIDI OUT = 1</text:span></text:p>
          </draw:text-box>
        </draw:frame>
        <draw:custom-shape draw:style-name="gr1" draw:text-style-name="P2" xml:id="id2" draw:id="id2" draw:layer="layout" svg:width="6cm" svg:height="4cm" svg:x="20.05cm" svg:y="7.7cm">
          <text:p text:style-name="P1"><text:span text:style-name="T1">&gt;SPEED <text:s text:c="2"/>DELAY</text:span></text:p>
          <text:p text:style-name="P3"><text:span text:style-name="T2"><text:s/></text:span><text:span text:style-name="T2">DEPTH <text:s text:c="2"/>WAVE</text:span></text:p>
          <text:p text:style-name="P3"><text:span text:style-name="T2"><text:s/></text:span><text:span text:style-name="T2">MSP <text:s text:c="3"/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7.784cm" svg:y1="8.489cm" svg:x2="20.05cm" svg:y2="9.7cm" draw:end-shape="id2" draw:end-glue-point="3" svg:d="M17784 8489h863v1211h1403" svg:viewBox="0 0 2267 1212">
          <text:p/>
        </draw:connector>
        <draw:custom-shape draw:style-name="gr1" draw:text-style-name="P2" xml:id="id3" draw:id="id3" draw:layer="layout" svg:width="6cm" svg:height="4cm" svg:x="19.55cm" svg:y="13.4cm">
          <text:p text:style-name="P1"><text:span text:style-name="T1">&gt;LDE <text:s text:c="4"/>RDE</text:span></text:p>
          <text:p text:style-name="P3"><text:span text:style-name="T2"><text:s/></text:span><text:span text:style-name="T2">LCU <text:s text:c="4"/>RDU</text:span></text:p>
          <text:p text:style-name="P3"><text:span text:style-name="T2"><text:s/></text:span><text:span text:style-name="T2">BRK <text:s text:c="4"/>KRS</text:span></text:p>
          <text:p text:style-name="P3"><text:span text:style-name="T2"><text:s text:c="6"/>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-0.316cm" svg:x1="17.623cm" svg:y1="9.571cm" svg:x2="19.55cm" svg:y2="15.4cm" draw:end-shape="id3" svg:d="M17623 9571h377v5829h1550" svg:viewBox="0 0 1928 5830">
          <text:p/>
        </draw:connector>
        <draw:custom-shape draw:style-name="gr1" draw:text-style-name="P2" xml:id="id4" draw:id="id4" draw:layer="layout" svg:width="6cm" svg:height="4cm" svg:x="8.6cm" svg:y="14.4cm">
          <text:p text:style-name="P1"><text:span text:style-name="T1">&gt;FREQ1 <text:s/></text:span></text:p>
          <text:p text:style-name="P3"><text:span text:style-name="T2"><text:s/></text:span><text:span text:style-name="T2">FREQ2</text:span></text:p>
          <text:p text:style-name="P3"><text:span text:style-name="T2"><text:s/></text:span><text:span text:style-name="T2">FREQ3</text:span></text:p>
          <text:p text:style-name="P3"><text:span text:style-name="T2"><text:s/></text:span><text:span text:style-name="T2">FREQ4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2.447cm" svg:y1="10.79cm" svg:x2="11.6cm" svg:y2="14.4cm" draw:end-shape="id4" draw:end-glue-point="0" svg:d="M12447 10790v1535h-847v2075" svg:viewBox="0 0 848 3611">
          <text:p/>
        </draw:connector>
        <draw:custom-shape draw:style-name="gr1" draw:text-style-name="P2" xml:id="id5" draw:id="id5" draw:layer="layout" svg:width="6cm" svg:height="4cm" svg:x="2.05cm" svg:y="8.9cm">
          <text:p text:style-name="P1"><text:span text:style-name="T1">&gt;LVL1 <text:s text:c="3"/>KVS1</text:span></text:p>
          <text:p text:style-name="P3"><text:span text:style-name="T2"><text:s/></text:span><text:span text:style-name="T2">LVL2 <text:s text:c="3"/>KVS2</text:span></text:p>
          <text:p text:style-name="P3"><text:span text:style-name="T2"><text:s/></text:span><text:span text:style-name="T2">LVL3 <text:s text:c="3"/>KVS3</text:span></text:p>
          <text:p text:style-name="P3"><text:span text:style-name="T2"><text:s/></text:span><text:span text:style-name="T2">LVL4 <text:s text:c="3"/>KVS4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0.463cm" svg:x1="10.583cm" svg:y1="8.61cm" svg:x2="8.05cm" svg:y2="10.9cm" draw:end-shape="id5" draw:end-glue-point="1" svg:d="M10583 8610h-433v2290h-2100" svg:viewBox="0 0 2534 2291">
          <text:p/>
        </draw:connector>
        <draw:custom-shape draw:style-name="gr1" draw:text-style-name="P2" xml:id="id6" draw:id="id6" draw:layer="layout" svg:width="6cm" svg:height="4cm" svg:x="2cm" svg:y="4.05cm">
          <text:p text:style-name="P1"><text:span text:style-name="T1">&gt;</text:span><text:span text:style-name="T2">A1 <text:s/>D1 <text:s/>S1 <text:s/>R1</text:span></text:p>
          <text:p text:style-name="P3"><text:span text:style-name="T2"><text:s/></text:span><text:span text:style-name="T2">A2 <text:s/>D2 <text:s/>S2 <text:s/>R2</text:span></text:p>
          <text:p text:style-name="P3"><text:span text:style-name="T2"><text:s/></text:span><text:span text:style-name="T2">A3 <text:s/>D3 <text:s/>S3 <text:s/>R3</text:span></text:p>
          <text:p text:style-name="P3"><text:span text:style-name="T2"><text:s/></text:span><text:span text:style-name="T2">A4 <text:s/>D4 <text:s/>S4 <text:s/>R4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0.77cm" svg:y1="7.843cm" svg:x2="8cm" svg:y2="6.05cm" draw:end-shape="id6" draw:end-glue-point="1" svg:d="M10770 7843h-1014v-1793h-1756" svg:viewBox="0 0 2771 179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2:35:28.978336570</meta:creation-date>
    <dc:date>2026-05-25T16:06:46.410508377</dc:date>
    <meta:editing-duration>PT3H24M40S</meta:editing-duration>
    <meta:editing-cycles>18</meta:editing-cycles>
    <meta:generator>LibreOffice/24.2.7.2$Linux_X86_64 LibreOffice_project/420$Build-2</meta:generator>
    <meta:print-date>2026-04-13T13:14:40.184856757</meta:print-date>
    <meta:printed-by>Fichiers PDF</meta:printed-by>
    <meta:document-statistic meta:object-count="15"/>
  </office:meta>
</office:document-meta>
</file>